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Tahoma" svg:font-family="Tahoma" style:font-family-generic="system" style:font-pitch="variable"/>
    <style:font-face style:name="맑은 고딕" svg:font-family="'맑은 고딕'" style:font-family-generic="swiss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14.436cm"/>
    </style:style>
    <style:style style:name="co3" style:family="table-column">
      <style:table-column-properties fo:break-before="auto" style:column-width="2.461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5.581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3.406cm" fo:break-before="auto" style:use-optimal-row-height="true"/>
    </style:style>
    <style:style style:name="ro5" style:family="table-row">
      <style:table-row-properties style:row-height="2.291cm" fo:break-before="auto" style:use-optimal-row-height="true"/>
    </style:style>
    <style:style style:name="ro6" style:family="table-row">
      <style:table-row-properties style:row-height="1.734cm" fo:break-before="auto" style:use-optimal-row-height="true"/>
    </style:style>
    <style:style style:name="ro7" style:family="table-row">
      <style:table-row-properties style:row-height="3.963cm" fo:break-before="auto" style:use-optimal-row-height="true"/>
    </style:style>
    <style:style style:name="ta1" style:family="table" style:master-page-name="PageStyle_5f_Schema">
      <style:table-properties table:display="true" style:writing-mode="lr-tb"/>
    </style:style>
    <style:style style:name="ta2" style:family="table" style:master-page-name="PageStyle_5f_Appendix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ko" style:country-asian="KR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chem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object_typ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레코드가 표현하는 객체가 어떤 종류의 객체인지를 선언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table:style-name="ce1" office:value-type="string" calcext:value-type="string">
            <text:p>&lt;object_type object_category="article" article_type="Review_Article"/&gt;    &lt;object_type object_category="article" article_type="Original_Article"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6개의 Attribute (object_category / article_type / dataset_type / image_type / sound_type) 를 제한된 용어를 이용해 기술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olled Vocabulary</text:p>
          </table:table-cell>
          <table:table-cell office:value-type="string" calcext:value-type="string">
            <text:p>(1) object_category</text:p>
            <text:p>See appendix 1-1.</text:p>
            <text:p>(2) article_type</text:p>
            <text:p>See appendix 1-2.</text:p>
            <text:p>(3) dataset_type</text:p>
            <text:p>See appendix 1-3.</text:p>
            <text:p>(4) image_type</text:p>
            <text:p>See appendix 1-4..</text:p>
            <text:p>(5) sound_type</text:p>
            <text:p>See appendix 1-5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object_tit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레코드가 표현하는 객체의 제목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table:style-name="ce1" office:value-type="string" calcext:value-type="string">
            <text:p>&lt;object_title&gt;        &lt;original_title&gt;Pharmacotherapy for mild hypertension&lt;/original_title&gt;        &lt;translated_title language="Español"&gt;Farmacoterapia para la hipertensión leve&lt;/translated_title&gt;        &lt;translated_title language="فارسی"&gt;دارودرمانی در مدیریت بالینی هیپرتانسیون خفیف&lt;/translated_title&gt;        &lt;translated_title language="Français"&gt;Pharmacothérapie pour l'hypertension légère&lt;/translated_title&gt;        &lt;translated_title language="Português"&gt;Tratamento medicamentoso para hipertensão leve&lt;/translated_title&gt;    &lt;/object_titl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하위 요소를 이용해 객체의 제목을 기재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하위 요소 : original_title / translated_tit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original_tit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레코드가 표현하는 객체의 원 제목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table:style-name="ce1" office:value-type="string" calcext:value-type="string">
            <text:p>&lt;original_title&gt;Pharmacotherapy for mild hypertension&lt;/original_titl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원 자료가 스스로의 제목을 표현하는 방식을 따라 그대로 입력합니다. UTF-8인코딩 사용을 권장합니다. 메타데이터 반입 시 인코딩에 오류가 있을 경우 원제목을 UTF-8로 옮길 수 있는지 여부를 판단하고, 불가능하다면 원본 보존을 위해 깨진 상태로 반입해 주세요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object_tit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translated_tit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레코드가 표현하는 객체의 번역된 제목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table:style-name="ce1" office:value-type="string" calcext:value-type="string">
            <text:p>&lt;translated_title language="فارسی"&gt;دارودرمانی در مدیریت بالینی هیپرتانسیون خفیف&lt;/translated_titl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공식 번역 제목을 입력하고, attribute에 언어정보를 입력합니다. UTF-8인코딩 사용을 권장합니다. 메타데이터 반입 시 인코딩에 오류가 있을 경우 원제목을 UTF-8로 옮길 수 있는지 여부를 판단하고, 불가능하다면 원본 보존을 위해 깨진 상태로 반입해 주세요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object_tit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published_d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객체가 출판되거나 공개된 날짜와 관련된 정보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table:style-name="ce1" office:value-type="string" calcext:value-type="string">
            <text:p>&lt;published_date&gt; &lt;first_published_date&gt;2021-12-14&lt;/first_published_date&gt; &lt;/published_dat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하위 요소에 자세한 정보를 입력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하위 요소 : received_date, revised_date, accepted_date, first_published_date, issue_publish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received_d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주로 학술지에서 논문을 투고받은 날짜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table:style-name="ce2" office:value-type="string" calcext:value-type="string">
            <text:p>&lt;received_date&gt;2024-06-15&lt;/received_dat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YYYY-MM-DD의 형식으로 입력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published_d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xs:d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revised_d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주로 학술지에서 논문을 리뷰한 뒤 이를 토대로 수정본이 제출된 날짜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table:style-name="ce2" office:value-type="string" calcext:value-type="string">
            <text:p>&lt;revised_date&gt;2024-06-15&lt;/revised_dat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YYYY-MM-DD의 형식으로 입력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published_d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xs:d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accepted_d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table:style-name="ce1" office:value-type="string" calcext:value-type="string">
            <text:p>자료의 심사가 완료되어 게재/등록이 확정된 날짜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table:style-name="ce2" office:value-type="string" calcext:value-type="string">
            <text:p>&lt;accepted_date&gt;2024-06-15&lt;/accepted_dat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YYYY-MM-DD의 형식으로 입력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published_d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xs:d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table:style-name="ce2" office:value-type="string" calcext:value-type="string">
            <text:p>first_published_d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table:style-name="ce1" office:value-type="string" calcext:value-type="string">
            <text:p>자료가 처음으로 인터넷 등에 공개된 날짜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table:style-name="ce2" office:value-type="string" calcext:value-type="string">
            <text:p>&lt;first_published_date&gt;2024-06-15&lt;/first_published_dat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YYYY-MM-DD의 형식으로 입력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published_d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xs:d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table:style-name="ce2" office:value-type="string" calcext:value-type="string">
            <text:p>issue_published_d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table:style-name="ce3" office:value-type="string" calcext:value-type="string">
            <text:p>주로 논문의 경우 공식 권호 등을 통해 출간된 날짜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table:style-name="ce2" office:value-type="string" calcext:value-type="string">
            <text:p>&lt;issue_published_date&gt;2024-06-15&lt;/issue_published_dat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YYYY-MM-DD의 형식으로 입력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published_d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xs:d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author_inform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객체의 저자/제작자와 관련된 정보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table:style-name="ce1" office:value-type="string" calcext:value-type="string">
            <text:p>&lt;author_information&gt; &lt;author_type&gt;1st_author&lt;/author_type&gt; &lt;author_type&gt;corresponding_author&lt;/author_type&gt; &lt;!--첫번째 저자이면서 교신저자인 경우입니다--&gt; &lt;author_name&gt; &lt;full_name&gt;Laura E. M. Wisse&lt;/full_name&gt; &lt;/author_name&gt; &lt;author_address&gt;Department of Clinical Science Lund, Lund University, Lund, Sweden&lt;/author_address&gt; &lt;author_email&gt;laura.wisse@med.lu.se&lt;/author_email&gt; &lt;author_position&gt;1&lt;/author_position&gt; &lt;/author_information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하나의author_information 요소는 한 명의 저자를 의미합니다. 하위 요소들을 이용해 상세히 기술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하위 요소 : author_type, author_name, author_identifier, author_address, author_email, author_posi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author_typ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객체의 저자가 맡은 역할에 대한 정보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author_type&gt;1st_author&lt;/author_type&gt; <text:s text:c="8"/>&lt;author_type&gt;corresponding_author&lt;/author_typ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저자의 역할을 통제어휘에서 골라 입력합니다. 만일 제 1 저자이면서 교신저자인 경우 author_type을 반복하여 2개 역할을 입력해 줍니다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author_inform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See appendix 2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author_nam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객체의 저자가 가진 이름정보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Example</text:p>
          </table:table-cell>
          <table:table-cell table:style-name="ce2" office:value-type="string" calcext:value-type="string">
            <text:p>&lt;author_name&gt;</text:p>
            <text:p>            &lt;full_name&gt;Oskar Hansson&lt;/full_name&gt;</text:p>
            <text:p>        &lt;/author_nam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이름에 대한 하위 요소 4개를 이용해 이름 정보를 자세하게 기술합니다. 성 / 가운데이름 / 이름을 구분할 수 없는 경우 full_name만 입력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author_information / 하위 요소 : full_name, given_name, middle_name, family_nam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full_nam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table:style-name="ce4" office:value-type="string" calcext:value-type="string">
            <text:p>저자의 전체 이름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full_name&gt;Dominic Wang&lt;/full_nam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저자의 전체 이름을 논문에 표기된 그대로 입력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author_nam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given_nam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저자의 이름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given_name&gt;Dominic&lt;/given_nam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저자의 이름을 구분할 수 있는 경우 논문에 표기된 그대로 입력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author_nam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middle_nam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저자의 가운데 이름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middle_name&gt;Carla&lt;/middle_nam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저자의 가운데 이름을 구분할 수 있는 경우 논문에 표기된 그대로 입력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author_nam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family_nam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저자의 성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family_name&gt;Medeiros Silva&lt;/family_nam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저자의 성을 구분할 수 있는 경우 논문에 표기된 그대로 입력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author_nam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author_identifi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저자 고유의 식별자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author_identifier type="orcid"&gt;0000-0003-0211-8654&lt;/author_identifi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저자 식별자를 논문 혹은 리포지터리 전거 DB에서 확인할 수 있는 경우 입력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author_inform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See appendix 3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author_addr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저자의 소속기관 정보 혹은 주소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author_address&gt;Department of Health Research Methods, Evidence, and Impact, McMaster University, Hamilton, Ontario, Canada.&lt;/author_address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저자 소속기관 정보를 논문에 표기된 그대로 입력합니다. 2개 이상 기관에 소속된 경우 요소를 반복 입력하여 전부 표현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author_inform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author_emai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저자의 이메일 정보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author_email&gt;millsej@mcmaster.ca&lt;/author_email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저자의 이메일이 논문에 명시되어 있을 경우 이를 입력합니다. 2개 이상의 이메일이 표기된 경우 요소를 반복 입력하여 전부 표현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author_inform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author_posi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논문에서 저자가 몇번째에 기재되었는지에 대한 정보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author_position&gt;4&lt;/author_position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저자 순서는 양수로만 표기가 가능하므로, 양수(xs:positiveInteger)로 입력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author_inform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object_external_identifi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레코드가 표현하는 객체가 외부 리포지터리 등에 등록되어 있고, 그 리포지터리에서 고유의 식별자를 가진 경우 그에 대한 정보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object_external_identifier type="PMID"&gt;34927127&lt;/object_external_identifi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attribute “type”에 식별자의 이름을 string 형태로 입력하고, 식별자를 텍스트로 기재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object_sour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레코드가 표현하는 객체가 게시된 매체에 대한 사항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Example</text:p>
          </table:table-cell>
          <table:table-cell office:value-type="string" calcext:value-type="string">
            <text:p>&lt;object_source&gt;</text:p>
            <text:p>        &lt;journal&gt;</text:p>
            <text:p>            &lt;journal_identifier&gt;2667-193X&lt;/journal_identifier&gt;</text:p>
            <text:p>            &lt;journal_title&gt;The Lancet Regional Health - Americas&lt;/journal_title&gt;</text:p>
            <text:p>        &lt;/journal&gt;</text:p>
            <text:p>    &lt;/object_sourc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하위 요소들을 통해 어떤 매체에 게시되었는지를 상세히 기술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하위 요소 : journal, database, conferen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journ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객체가 학술지에 실린 경우 그 학술지와 연결하기 위한 정보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Example</text:p>
          </table:table-cell>
          <table:table-cell office:value-type="string" calcext:value-type="string">
            <text:p>&lt;journal&gt;</text:p>
            <text:p>            &lt;journal_identifier&gt;2667-193X&lt;/journal_identifier&gt;</text:p>
            <text:p>            &lt;journal_title&gt;The Lancet Regional Health - Americas&lt;/journal_title&gt;</text:p>
            <text:p>        &lt;/journal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하위 요소 journal identifier와 journal title을 이용해 자세한 정보를 표현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object_source / 하위 요소 : journal_identifier, journal_tit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journal_identifi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학술지의 식별자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journal_identifier&gt;2667-193X&lt;/journal_identifi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학술지 식별자를 NLM Catalog (<text:a xlink:href="https://www.ncbi.nlm.nih.gov/nlmcatalog/" xlink:type="simple">https://www.ncbi.nlm.nih.gov/nlmcatalog/</text:a>), Journal Citation Reports (jcr.clarivate.com), Scopus (<text:a xlink:href="https://www.scopus.com/sources" xlink:type="simple">https://www.scopus.com/sources</text:a>) 등에서 확인하여 입력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journ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journal_tit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학술지 제목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journal_title&gt;The Lancet Regional Health - Americas&lt;/journal_titl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학술지 제목을 학술지 식별자가 있는 경우 신뢰할 수 있는 목록에서 가져오며, 그렇지 않은 경우 논문 등에 표기된 그대로 입력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journ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databa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객체가 데이터베이스에 수록된 경우 그 데이터베이스와 연결하기 위한 정보입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Example</text:p>
          </table:table-cell>
          <table:table-cell office:value-type="string" calcext:value-type="string">
            <text:p>&lt;database&gt;</text:p>
            <text:p>   &lt;database_name&gt;Micromedex&lt;/database_name&gt;</text:p>
            <text:p>&lt;/databas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하위 요소 database_identifier와 database_title을 이용해 자세한 정보를 표현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object_source / 하위 요소 : database_identifier, database_tit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database_identifi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데이터베이스의 식별자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database_identifier&gt;<text:a xlink:href="https://www.micromedexsolutions.com/" xlink:type="simple">https://www.micromedexsolutions.com</text:a>&lt;/database_identifi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URL, DOI 혹은 기타 식별자를 확인하여 입력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databa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database_nam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데이터베이스의 이름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database_name&gt;Micromedex&lt;/database_nam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데이터베이스의 공식 명칭을 웹페이지, 소개자료 등에서 확인하여 기재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databa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conferen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컨퍼런스 관련 정보입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7">
          <table:table-cell office:value-type="string" calcext:value-type="string">
            <text:p>Example</text:p>
          </table:table-cell>
          <table:table-cell office:value-type="string" calcext:value-type="string">
            <text:p>&lt;conference&gt;</text:p>
            <text:p>            &lt;conference_title&gt;Alzheimer’s Association International Conference&lt;/conference_title&gt;</text:p>
            <text:p>            &lt;conference_date&gt;</text:p>
            <text:p>                &lt;start_date&gt;2024-07-28&lt;/start_date&gt;</text:p>
            <text:p>                &lt;end_date&gt;2024-07-28&lt;/end_date&gt;</text:p>
            <text:p>            &lt;/conference_date&gt;</text:p>
            <text:p>        &lt;/conferenc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하위 요소를 이용하여 자세하게 기술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object_source / 하위 요소 : conference_title, conference_identifier, conference_d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conference_tit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컨퍼런스의 이름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conference_title&gt;Alzheimer’s Association International Conference&lt;/conference_titl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컨퍼런스의 정식 명칭을 찾아 입력하되, 정식 명칭을 찾기 어려운 경우 논문에 기재된 그대로 입력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conferen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conference_identifi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컨퍼런스의 식별자를 입력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conference_identifier&gt;<text:a xlink:href="https://neurips.cc/Conferences/2025" xlink:type="simple">https://neurips.cc/Conferences/2025</text:a>&lt;/conference_identifi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컨퍼런스의 URL, DOI등 식별자 정보를 확인하여 입력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conferen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conference_d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컨퍼런스가 열린 기간 정보입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Example</text:p>
          </table:table-cell>
          <table:table-cell office:value-type="string" calcext:value-type="string">
            <text:p>&lt;conference_date&gt;</text:p>
            <text:p>                &lt;start_date&gt;2024-07-28&lt;/start_date&gt;</text:p>
            <text:p>                &lt;end_date&gt;2024-07-28&lt;/end_date&gt;</text:p>
            <text:p>            &lt;/conference_dat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하위 요소 start_date와 end_date를 이용해 컨퍼런스 기간 정보를 입력합니다. 하루동안 진행된 경우 동일한 날짜를 start_date와 end_date에 입력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conference, 하위 요소 : start_date, end_d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start_d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컨퍼런스가 개최된 날짜의 정보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start_date&gt;2024-07-28&lt;/start_dat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YYYY-MM-DD의 형식으로 입력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conference_d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end_d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컨퍼런스가 폐막한 날짜의 정보입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end_date&gt;2024-07-28&lt;/end_dat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YYYY-MM-DD의 형식으로 입력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conference_d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citation_inform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인용/피인용과 관련된 정보입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Example</text:p>
          </table:table-cell>
          <table:table-cell office:value-type="string" calcext:value-type="string">
            <text:p>&lt;citation_information&gt;</text:p>
            <text:p>        &lt;citation_source source="altmetric" identifier_type="url" identifier="https://cochrane.altmetric.com/details/194628783" last_checked="2026-06-12"/&gt;</text:p>
            <text:p>    &lt;/citation_inform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하위 요소 citation_source를 이용해 이 객체의 인용정보를 어떤 출처에서 가져올 수 있는지 기재합니다. 인용횟수 등은 출처와 연결되며 자동으로 갱신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하위 요소 : citation_sour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citation_sour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인용/피인용 정보의 정보원을 상세히 기재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citation_source source="altmetric" identifier_type="url" identifier="https://cochrane.altmetric.com/details/194628783" last_checked="2026-06-12"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attribute “source”에 출처를 기재하고, identifier_type에는 인용/피인용 정보원에서 객체를 표시하는 식별자의 종류를 기재합니다. identifier에 실제 식별자 값을 입력합니다. last_checked attribute는 시스템이 자동으로 처리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citation_inform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source: see Appendix 4-1 / identifier_type: see Appendix 4-2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object_stat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객체의 상태에 대한 정보입니다. 출판단계, 출판이후단계, 리포지터리처리단계, 기타 상태 등이 포함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Example</text:p>
          </table:table-cell>
          <table:table-cell office:value-type="string" calcext:value-type="string">
            <text:p>    &lt;object_status&gt;</text:p>
            <text:p>        &lt;publication_stage&gt;online_published&lt;/publication_stage&gt;</text:p>
            <text:p>        &lt;post_publication_status status="retracted" /&gt;</text:p>
            <text:p>        &lt;repository_status&gt;under_review&lt;/repository_status&gt;</text:p>
            <text:p>        &lt;status_note&gt;Retraction 된 기관 소속 연구자의 논문을 리포지터리에 등록할 것인지 내부 정책 논의 중&lt;/status_note&gt;</text:p>
            <text:p>    &lt;/object_status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하위 요소 4개를 이용해 객체의 현재 상태를 표현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하위 요소 : publication_stage, post_publication_status, repository_status, status_no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publication_sta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출판 또는 공개 단계에 대한 정보입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publication_stage&gt;online_published&lt;/publication_stag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미리 규정된 용어집에서 단계를 선택하여 입력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object_stat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See Appendix 5-1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post_publication_stat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출판 후 이의제기, 논문철회, 수정 등 상태를 표현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post_publication_status status="retracted"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논문의 현재 상태를 API나 직접 검색 등으로 확인한 뒤 status attribute에는 정해진 값을 입력하고, status_date에 상태 변경된 날짜를 xs:date타입으로, source에는 이를 확인한 학술지/pubpeer 등 플랫폼을, source_uri는 출처의 uri를 기재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object_stat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See Appendix 5-2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repository_stat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이 객체가 리포지터리에 제출되고 나서의 상태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repository_status&gt;under_review&lt;/repository_status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미리 정해진 value를 요소에 입력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object_stat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See Appendix 5-3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status_no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객체 상태와 관련된 주기사항입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status_note&gt;Retraction 된 기관 소속 연구자의 논문을 리포지터리에 등록할 것인지 내부 정책 논의 중&lt;/status_not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필요에 따라 객체 상태를 string 형태로 수기 입력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ntrolled Vocabular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dditional Info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text_inform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레코드가 표현하는 객체와 관련된 각종 텍스트 정보 (초록, 저자노트, 키워드 등) 로서 검색을 용이하게 만드는 정보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Example</text:p>
          </table:table-cell>
          <table:table-cell office:value-type="string" calcext:value-type="string">
            <text:p>&lt;text_information&gt;</text:p>
            <text:p>        &lt;abstract&gt;Background: Observational studies have postulated a therapeutic role of metformin in treating COVID-19. … There were also no differences between metformin and placebo observed for other secondary clinical outcomes.&lt;/abstract&gt;</text:p>
            <text:p>        &lt;keywords&gt;Brazil; COVID-19; Hospitalization; Metformin; Outpatients; Randomized clinical trial.&lt;/keywords&gt;</text:p>
            <text:p>    &lt;/text_information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하위 요소를 활용해 상세히 기재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하위 요소 : abstract, note_from_article_keywords, MeSH_heading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abstrac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객체의 초록 정보입니다. 데이터베이스 설명 / 이미지 설명 (figure legend) 도 여기에 포함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abstract&gt;Background: Observational studies have postulated a therapeutic role of metformin in treating COVID-19. … There were also no differences between metformin and placebo observed for other secondary clinical outcomes.&lt;/abstract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초록, 데이터베이스 설명, 이미지 설명 등 각종 설명 문구를 확인하여 string 형태로 옮깁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text_inform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note_from_artic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객체 자체가 제공하는 각종 노트(부가사항) 정보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note_from_article&gt;These authors contributed equally as co-senior authors of this work.&lt;/note_from_articl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객체에서 확인할 수 있는 부가사항 등을 찾아 입력하고, 상황에 따라 동일 요소를 반복하여 기재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text_inform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keyword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객체에 포함된 키워드 정보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keywords&gt;Brazil; COVID-19; Hospitalization; Metformin; Outpatients; Randomized clinical trial.&lt;/keywords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하나의 요소에 전체 키워드를 구분자 (;, “,”, Tab, 기타) 로 구분하여 입력하거나, 개별 요소마다 하나의 키워드를 입력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text_inform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MeSH_heading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PubMed에 색인된 레코드에 부여되는 MeSH 통제어입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Example</text:p>
          </table:table-cell>
          <table:table-cell office:value-type="string" calcext:value-type="string">
            <text:p>&lt;MeSH_headings&gt;Adult&lt;/MeSH_headings&gt;</text:p>
            <text:p>        &lt;MeSH_headings&gt;Antihypertensive Agents* / adverse effects&lt;/MeSH_headings&gt;</text:p>
            <text:p>        &lt;MeSH_headings&gt;Antihypertensive Agents* / therapeutic use&lt;/MeSH_headings&gt;</text:p>
            <text:p>        &lt;MeSH_headings&gt;Cardiovascular Diseases / mortality&lt;/MeSH_headings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PubMed API, PubMed XML 등에서 MeSH 통제어 정보를 확인한 뒤, 하나의 요소에 전체 통제어를 구분자로 구분하여 입력하거나, 개별 요소마다 하나의 통제어를 입력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text_inform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object_link_inform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객체가 다른 객체 등과 연결되는 정보입니다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Example</text:p>
          </table:table-cell>
          <table:table-cell office:value-type="string" calcext:value-type="string">
            <text:p>&lt;object_link_information&gt;</text:p>
            <text:p>        &lt;link link_type="cites" identifier_type="doi"&gt;10.1016/j.bbadis.2017.05.027&lt;/link&gt;</text:p>
            <text:p>        &lt;link link_type="citedBy" identifier_type="pmid"&gt;35120771&lt;/link&gt;</text:p>
            <text:p>        &lt;link link_type="hasRetraction" identifier_type="other"&gt;<text:a xlink:href="https://www.sciencedirect.com/science/article/pii/S2667193X21001381" xlink:type="simple">https://www.sciencedirect.com/science/article/pii/S2667193X21001381</text:a>&lt;/link&gt;</text:p>
            <text:p>        &lt;link link_type="hasExpressionOfConcern" identifier_type="doi"&gt;10.1016/j.lana.2024.100703&lt;/link&gt;</text:p>
            <text:p>&lt;/object_link_information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객체의 참고문헌/.참고자료 목록을 확인하여 그 식별자를 입력합니다. 식별자가 없는 경우 별도의 임시 레코드를 리포지터리에 생성한 뒤 그 식별자를 연결해 주거나 attribute other선택 후 unavailable로 입력 가능합니다. 하나의 요소에는 하나의 식별자만 입력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하위 요소 : lin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lin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객체 간 개별 연결에 대한 정보입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link link_type="cites" identifier_type="doi"&gt;10.1016/j.bbadis.2017.05.027&lt;/link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attribute link_type에서 이 연결이 어떤 의미인지를 통제어를 통해 기술하고, attribute identifier_type을 통해 식별자의 종류가 무엇인지 기술합니다. 그리고 string 정보로 식별자 값을 입력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object_link_inform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See Appendix 6-1, 6-2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rights_inform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객체의 저작권과 관련된 정보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Example</text:p>
          </table:table-cell>
          <table:table-cell office:value-type="string" calcext:value-type="string">
            <text:p>&lt;rights_information&gt;</text:p>
            <text:p>        &lt;rights_status&gt;other&lt;/rights_status&gt;</text:p>
            <text:p>        &lt;access_model&gt;open_access&lt;/access_model&gt;</text:p>
            <text:p>        &lt;publishing_model&gt;openaccess_gold&lt;/publishing_model&gt;</text:p>
            <text:p>        &lt;license_information licence_type="creative_commons" licence_code="CC-BY-NC-ND 4.0"/&gt;</text:p>
            <text:p>    &lt;/rights_information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하위 요소들을 통해 저작권에 대한 정보를 분류하여 기술합니다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하위 요소 : rights_status, access_model, publishing_model, license_information, rights_holder, rights_statem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rights_stat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저작권의 현재 상태에 대한 서술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rights_status&gt;other&lt;/rights_status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미리 정해진 value 값을 appendix를 참고하여 입력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rights_inform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See Appendix 7-1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access_mode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객체의 접근 방식과 관련된 정보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access_model&gt;open_access&lt;/access_model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비용을 지불해야 접근이 가능한 경우 subscription으로 입력합니다. 이외의 상태는 <text:s/>appendix를 참고하여 미리 규정된 통제어를 입력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rights_inform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See Appendix 7-2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publishing_mode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학술지 아티클의 출판 모델 정보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publishing_model&gt;openaccess_gold&lt;/publishing_model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appendix를 참고하여 학술지 상태에 대한 통제어를 입력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rights_inform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See Appendix 7-3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license_inform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라이선스 관련 정보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license_information licence_type="creative_commons" licence_code="CC-BY-NC-ND 4.0"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license_type attribute에 라이선스 형식을 appendix 7-4를 참고하여 입력하고, license_code에 CC-BY-4.0, Apache와 같은 특정 라이선스 코드를 입력합니다. 관련된 URI가 있는 경우 license_uri attribute에 입력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rights_inform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See Appendix 7-4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rights_hold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라이선스 보유자에 대한 정보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rights_holder&gt;Microsoft&lt;/rights_hold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라이선스 보유자를 자유롭게 string 형식으로 입력합니다 (회사, 개인 등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rights_inform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rights_statem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라이선스 관련하여 객체가 별도로 표시한 내용을 옮겨 적습니다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rights_statement&gt;1999 All rights reserved.&lt;/rights_statement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라이선스 관련하여 객체가 별도로 표시한 내용을 자유롭게 String 형식으로 입력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rights_inform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administrative_metada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리포지터리의 관리 메타데이터 입력란입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Example</text:p>
          </table:table-cell>
          <table:table-cell office:value-type="string" calcext:value-type="string">
            <text:p>&lt;administrative_metadata&gt;</text:p>
            <text:p>        &lt;repo_register_id&gt;MMLR2026-38714457&lt;/repo_register_id&gt;</text:p>
            <text:p>        &lt;record_status&gt;created&lt;/record_status&gt;</text:p>
            <text:p>        &lt;created_date&gt;2026-06-12T18:00:00&lt;/created_date&gt;</text:p>
            <text:p>        &lt;last_modified_date&gt;2026-06-12T18:00:00&lt;/last_modified_date&gt;</text:p>
            <text:p>    &lt;/administrative_metadata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하위 요소를 활용하여 리포지터리에서 레코드를 관리할 때 사용하는 정보를 기재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하위 요소 : repo_register_id, record_status, created_date, last_modified_date, note_by_repositor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repo_register_i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리포지터리 등록번호입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repo_register_id&gt;MMLR2026-38714457&lt;/repo_register_id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리포지터리마다 단순 정수를 사용할 수도, 문자열과 숫자, 혹은 특수문자가 포함된 ID를 사용할 수 있습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administrative_metada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record_stat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메타데이터 레코드 자체에 대한 관리 메타데이터 영역입니다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record_status&gt;created&lt;/record_status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미리 정해진 통제어를 사용해 메타데이터 레코드 상태를 기재합니다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administrative_metada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See Appendix 8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created_d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메타데이터 레코드 생성 시각입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created_date&gt;2026-06-12T18:00:00&lt;/created_dat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xs:dateTime (YYYY-MM-DDTHH:MM:SS 형식으로 입력합니다. 보통 시스템이 자동으로 입력하도록 설계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administrative_metada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last_modified_d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레코드가 최종적으로 수정된 시점입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revised_date&gt;2026-06-15T13:26:24&lt;/revised_date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xs:dateTime (YYYY-MM-DDTHH:MM:SS 형식으로 입력합니다. 보통 시스템이 자동으로 입력하도록 설계합니다. 설계에 따라 각 수정 버전은 별도의 아카이브 DB에서 관리합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administrative_metada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note_by_repositor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s</text:p>
          </table:table-cell>
          <table:table-cell office:value-type="string" calcext:value-type="string">
            <text:p>리포지터리에서 레코드 보완 등을 위한 정보입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able</text:p>
          </table:table-cell>
          <table:table-cell office:value-type="string" calcext:value-type="string">
            <text:p>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&lt;note_by_repository&gt;메타데이터의 일부 영역 인코딩이 깨진 것으로 보여, 복구가 필요합니다&lt;/note_by_repository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To Use</text:p>
          </table:table-cell>
          <table:table-cell office:value-type="string" calcext:value-type="string">
            <text:p>string 형태로 자유롭게 기술하며, 여러 번 입력할 수 있습니다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ines / Refinement</text:p>
          </table:table-cell>
          <table:table-cell office:value-type="string" calcext:value-type="string">
            <text:p>상위 요소 : administrative_metada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led Vocabulary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Info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</table:table>
      <table:table table:name="Appendix" table:style-name="ta2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3" table:number-columns-repeated="16382"/>
        <table:table-row table:style-name="ro1">
          <table:table-cell office:value-type="string" calcext:value-type="string">
            <text:p>Appendix 1-1. object_category attributes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설명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일반 논문 계통인 경우 article로 입력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데이터 모음집(데이터셋) 인 경우 dataset으로 입력합니다 이미지, 사운드, 비디오 등의 모음집도 데이터셋으로 처리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데이터셋에 포함되지 않는 개별 이미지인 경우 image로 처리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데이터셋에 포함되지 않는 개별 소리 자료인 경우 sound로 처리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데이터셋에 포함되지 않는 영상자료인 경우 video로 처리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연구자가 개발한 소프트웨어, 혹은 링크 등에 필요한 상용 소프트웨어를 입력할 때 사용합니다. 소스 코드도 소프트웨어로 처리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정식 논문으로 발표되지 않는 실험 프로토콜 등을 여기에 입력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기타 문서 자료 등을 처리하기 위해 사용합니다. 특정한 문서자료가 늘어날 경우 해당 문서의 범주를 새로 등록하는 것도 고려해 볼 수 있습니다</text:p>
          </table:table-cell>
          <table:table-cell table:style-name="Default" table:number-columns-repeated="16382"/>
        </table:table-row>
        <table:table-row table:style-name="ro1" table:number-rows-repeated="2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Appendix 1-2. article_type attributes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설명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riginal_article</text:p>
          </table:table-cell>
          <table:table-cell office:value-type="string" calcext:value-type="string">
            <text:p>일반적으로 원저로 인식되는 원고를 origianl_article로 입력합니다. 기관 지침에 따라 다른 article_type과 병행하여 입력할 수 있습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review_article</text:p>
          </table:table-cell>
          <table:table-cell office:value-type="string" calcext:value-type="string">
            <text:p>일반적으로 종설으로 인식되는 원고를 review_article로 입력합니다. 기관의 정책에 따라 original article과 병행해서 사용할 수 있습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ase_report</text:p>
          </table:table-cell>
          <table:table-cell office:value-type="string" calcext:value-type="string">
            <text:p>일반적으로 증례보고으로 인식되는 원고를 case_report로 입력합니다. <text:s/>기관의 정책에 따라 original article과 병행해서 사용할 수 있습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randomized_controlled_trial</text:p>
          </table:table-cell>
          <table:table-cell office:value-type="string" calcext:value-type="string">
            <text:p>일반적으로 무작위대조임상시험(RCT)으로 인식되는 원고를 randomized_controlled_trial로 입력합니다. 기관의 정책에 따라 original article과 병행해서 사용할 수 있습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editorial</text:p>
          </table:table-cell>
          <table:table-cell office:value-type="string" calcext:value-type="string">
            <text:p>일반적으로 학술지 편집자 주 등으로 인식되는 원고를 editorial로 입력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기존 출판된 논문의 수정사항으로 인식되는 원고를 correction으로 입력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학술지 등에서 편집자 또는 타 논문 저자에게 투고된 편지 형식으로 인식되는 원고를 letter로 입력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onference_paper</text:p>
          </table:table-cell>
          <table:table-cell office:value-type="string" calcext:value-type="string">
            <text:p>컨퍼런스에서 발표된 논문 형식의 원고를 conference_paper로 입력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onference_poster</text:p>
          </table:table-cell>
          <table:table-cell office:value-type="string" calcext:value-type="string">
            <text:p>컨퍼런스에서 발표된 포스터 형식의 원고를 conference_poster로 입력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preprint</text:p>
          </table:table-cell>
          <table:table-cell office:value-type="string" calcext:value-type="string">
            <text:p>정식 출판되지 않았지만 공개된 리포지터리(arXiv, medRxiv, etc) 등에 업로드된 출판 전 원고를 preprint로 입력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그 외 판단하기 어려운 원고는 others로 입력합니다.</text:p>
          </table:table-cell>
          <table:table-cell table:style-name="Default" table:number-columns-repeated="16382"/>
        </table:table-row>
        <table:table-row table:style-name="ro1" table:number-rows-repeated="2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Appendix 1-3. dataset_type attributes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설명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linical_dataset</text:p>
          </table:table-cell>
          <table:table-cell office:value-type="string" calcext:value-type="string">
            <text:p>임상시험 혹은 임상현장과 관련된 데이터셋입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experimental_dataset</text:p>
          </table:table-cell>
          <table:table-cell office:value-type="string" calcext:value-type="string">
            <text:p>임상시험 외 실험과 관련된 데이터셋입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survey_dataset</text:p>
          </table:table-cell>
          <table:table-cell office:value-type="string" calcext:value-type="string">
            <text:p>설문조사와 관련된 데이터셋입니다. 경우에 따라 임상시험 데이터셋과 함께 쓰일 수 있습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imaging_dataset</text:p>
          </table:table-cell>
          <table:table-cell office:value-type="string" calcext:value-type="string">
            <text:p>CT/MRI 영상 등 이미지 데이터셋입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genomic_dataset</text:p>
          </table:table-cell>
          <table:table-cell office:value-type="string" calcext:value-type="string">
            <text:p>유전자 검사, 혹은 유전자 시뮬레이션 데이터 등과 관련된 데이터셋입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administrative_dataset</text:p>
          </table:table-cell>
          <table:table-cell office:value-type="string" calcext:value-type="string">
            <text:p>실험 등과 직접적으로 관련되지 않은, 업무 관리 등에 해당하는 데이터셋입니다. 학술지 출판 APC 지원 데이터 등을 할당할 수 있습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statistical_dataset</text:p>
          </table:table-cell>
          <table:table-cell office:value-type="string" calcext:value-type="string">
            <text:p>통계와 관련된 데이터셋입니다. 경우에 따라 임상시험 데이터셋 등과 함께 쓰일 수 있습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ther_dataset</text:p>
          </table:table-cell>
          <table:table-cell office:value-type="string" calcext:value-type="string">
            <text:p>기타 데이터셋입니다</text:p>
          </table:table-cell>
          <table:table-cell table:style-name="Default" table:number-columns-repeated="16382"/>
        </table:table-row>
        <table:table-row table:style-name="ro1" table:number-rows-repeated="2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Appendix 1-4. image_type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설명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linical_image</text:p>
          </table:table-cell>
          <table:table-cell office:value-type="string" calcext:value-type="string">
            <text:p>임상시험 혹은 임상현장과 관련된 이미지입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article_image</text:p>
          </table:table-cell>
          <table:table-cell office:value-type="string" calcext:value-type="string">
            <text:p>논문과 관련된 이미지입니다(Figure n 등)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dataset_image</text:p>
          </table:table-cell>
          <table:table-cell office:value-type="string" calcext:value-type="string">
            <text:p>데이터셋과 관련된 이미지입니다(데이터셋 구조도 등)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experiment_image</text:p>
          </table:table-cell>
          <table:table-cell office:value-type="string" calcext:value-type="string">
            <text:p>실험과 관련된 이미지입니다(실험실 사진 등)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interview_image</text:p>
          </table:table-cell>
          <table:table-cell office:value-type="string" calcext:value-type="string">
            <text:p>인터뷰와 관련된 이미지입니다 (참가자 사진 등)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ther_image</text:p>
          </table:table-cell>
          <table:table-cell office:value-type="string" calcext:value-type="string">
            <text:p>기타 이미지입니다.</text:p>
          </table:table-cell>
          <table:table-cell table:style-name="Default" table:number-columns-repeated="16382"/>
        </table:table-row>
        <table:table-row table:style-name="ro1" table:number-rows-repeated="2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Appendix 1-5. sound_type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설명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linical_sound</text:p>
          </table:table-cell>
          <table:table-cell office:value-type="string" calcext:value-type="string">
            <text:p>임상시험 혹은 임상현장과 관련된 소리자료입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article_sound</text:p>
          </table:table-cell>
          <table:table-cell office:value-type="string" calcext:value-type="string">
            <text:p>논문출판과 관련된 소리자료입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dataset_sound</text:p>
          </table:table-cell>
          <table:table-cell office:value-type="string" calcext:value-type="string">
            <text:p>데이터셋과 관련된 소리자료입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experiment_sound</text:p>
          </table:table-cell>
          <table:table-cell office:value-type="string" calcext:value-type="string">
            <text:p>실험과 관련된 소리자료입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interview_sound</text:p>
          </table:table-cell>
          <table:table-cell office:value-type="string" calcext:value-type="string">
            <text:p>인터뷰와 관련된 소리자료입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ther_sound</text:p>
          </table:table-cell>
          <table:table-cell office:value-type="string" calcext:value-type="string">
            <text:p>기타 소리자료입니다</text:p>
          </table:table-cell>
          <table:table-cell table:style-name="Default" table:number-columns-repeated="16382"/>
        </table:table-row>
        <table:table-row table:style-name="ro1" table:number-rows-repeated="2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Appendix 2. author_type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설명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1st_author</text:p>
          </table:table-cell>
          <table:table-cell office:value-type="string" calcext:value-type="string">
            <text:p>저자가 제1저자로 확인되는 경우 입력합니다. 공동 제1저자도 포함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o_author</text:p>
          </table:table-cell>
          <table:table-cell office:value-type="string" calcext:value-type="string">
            <text:p>저자가 특별한 표기가 없는 공동저자인 경우 입력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senior_author</text:p>
          </table:table-cell>
          <table:table-cell office:value-type="string" calcext:value-type="string">
            <text:p>논문에서 저자가 Senior Author로 지정되어 있는 경우 입력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orresponding_author</text:p>
          </table:table-cell>
          <table:table-cell office:value-type="string" calcext:value-type="string">
            <text:p>논문에서 저자가 교신저자로 지정되어 있는 경우 입력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기타 특수한 저자 형태인 경우 입력합니다</text:p>
          </table:table-cell>
          <table:table-cell table:style-name="Default" table:number-columns-repeated="16382"/>
        </table:table-row>
        <table:table-row table:style-name="ro1" table:number-rows-repeated="2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Appendix 3. author_identifier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설명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rcid</text:p>
          </table:table-cell>
          <table:table-cell office:value-type="string" calcext:value-type="string">
            <text:p>ORCID 식별자를 입력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researcherid</text:p>
          </table:table-cell>
          <table:table-cell office:value-type="string" calcext:value-type="string">
            <text:p>Web of Science에서 사용하는 ResearcherID를 입력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scopus</text:p>
          </table:table-cell>
          <table:table-cell office:value-type="string" calcext:value-type="string">
            <text:p>Scopus에서 자동으로 생성된 저자ID를 입력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기타 식별자를 입력합니다. 가급적 [식별자명]ID의 형태로 입력합니다. 예) [CustomID]0002_ST_4018</text:p>
          </table:table-cell>
          <table:table-cell table:style-name="Default" table:number-columns-repeated="16382"/>
        </table:table-row>
        <table:table-row table:style-name="ro1" table:number-rows-repeated="2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Appendix 4-1. source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설명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pencitations</text:p>
          </table:table-cell>
          <table:table-cell office:value-type="string" calcext:value-type="string">
            <text:p>opencitations 데이터셋에서 인용정보를 수집한 경우 입력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google_scholar</text:p>
          </table:table-cell>
          <table:table-cell office:value-type="string" calcext:value-type="string">
            <text:p>google scholar에서 인용정보를 수집한 경우 입력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pubmed</text:p>
          </table:table-cell>
          <table:table-cell office:value-type="string" calcext:value-type="string">
            <text:p>미의학도서관 PubMed에서 인용정보를 수집한 경우 입력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wos</text:p>
          </table:table-cell>
          <table:table-cell office:value-type="string" calcext:value-type="string">
            <text:p>Clarivate Web of Science에서 인용정보를 수집한 경우 입력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scopus</text:p>
          </table:table-cell>
          <table:table-cell office:value-type="string" calcext:value-type="string">
            <text:p>Elsevier Scopus에서 인용정보를 수집한 경우 입력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altmetric</text:p>
          </table:table-cell>
          <table:table-cell office:value-type="string" calcext:value-type="string">
            <text:p>Altmetric에서 인용정보를 수집한 경우 입력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demensions</text:p>
          </table:table-cell>
          <table:table-cell office:value-type="string" calcext:value-type="string">
            <text:p>Demensions에서 인용정보를 수집한 경우 입력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rossref</text:p>
          </table:table-cell>
          <table:table-cell office:value-type="string" calcext:value-type="string">
            <text:p>CrossRef에서 인용정보를 수집한 경우 입력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internal</text:p>
          </table:table-cell>
          <table:table-cell office:value-type="string" calcext:value-type="string">
            <text:p>리포지터리 내에서의 인용정보를 입력할 때 사용합니다. 시스템이 구축되어 있다면 자동으로 인용-피인용 링크 정보를 이용해 갱신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기타 인용정보 출처입니다.</text:p>
          </table:table-cell>
          <table:table-cell table:style-name="Default" table:number-columns-repeated="16382"/>
        </table:table-row>
        <table:table-row table:style-name="ro1" table:number-rows-repeated="2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Appendix 4-2. identifier_type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설명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doi</text:p>
          </table:table-cell>
          <table:table-cell office:value-type="string" calcext:value-type="string">
            <text:p>DOI 식별자를 입력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pmid</text:p>
          </table:table-cell>
          <table:table-cell office:value-type="string" calcext:value-type="string">
            <text:p>PubMed에서 사용하는 PMID 식별자를 입력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pmcid</text:p>
          </table:table-cell>
          <table:table-cell office:value-type="string" calcext:value-type="string">
            <text:p>PubMed Central 에 등록된 논문의 경우 PMCID를 입력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wos_ut</text:p>
          </table:table-cell>
          <table:table-cell office:value-type="string" calcext:value-type="string">
            <text:p>Web of Science에 색인된 논문의 경우 그 고유식별자인 UT를 입력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scopus_eid</text:p>
          </table:table-cell>
          <table:table-cell office:value-type="string" calcext:value-type="string">
            <text:p>Scopus에 색인된 논문의 경우 그 고유식별자인 EID를 입력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internal_id</text:p>
          </table:table-cell>
          <table:table-cell office:value-type="string" calcext:value-type="string">
            <text:p>리포지터리 내에서의 인용정보를 입력할 때 사용합니다. repo_register_id를 입력할 때 이 속성을 사용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URL을 식별자로 사용할 때 입력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기타 식별자입니다. </text:p>
          </table:table-cell>
          <table:table-cell table:style-name="Default" table:number-columns-repeated="16382"/>
        </table:table-row>
        <table:table-row table:style-name="ro1" table:number-rows-repeated="2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Appendix 5-1. publication_stage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설명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not_submitted</text:p>
          </table:table-cell>
          <table:table-cell office:value-type="string" calcext:value-type="string">
            <text:p>제출 전 자료를 의미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submitted</text:p>
          </table:table-cell>
          <table:table-cell office:value-type="string" calcext:value-type="string">
            <text:p>학술지, DB, 컨퍼런스 등에 제출하고 현재 평가가 진행중인 상태입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accepted_not_opened</text:p>
          </table:table-cell>
          <table:table-cell office:value-type="string" calcext:value-type="string">
            <text:p>내부적으로 출판 등이 승인되었으나 외부에 공개되지 않은 상태입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just_accepted</text:p>
          </table:table-cell>
          <table:table-cell office:value-type="string" calcext:value-type="string">
            <text:p>승인되어 공개되었으나 포맷 등이 적용되지 않은 상태입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nline_published</text:p>
          </table:table-cell>
          <table:table-cell office:value-type="string" calcext:value-type="string">
            <text:p>정식 권호 출판은 되지 않고, 온라인 형태로 포맷이 적용된 상태입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issue_published</text:p>
          </table:table-cell>
          <table:table-cell office:value-type="string" calcext:value-type="string">
            <text:p>정식 권호로 출판된 상태입니다. 온라인 학술지의 경우 issue가 없을 수 있습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onference_published</text:p>
          </table:table-cell>
          <table:table-cell office:value-type="string" calcext:value-type="string">
            <text:p>컨퍼런스에서 발표된 경우 사용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preprint_posted</text:p>
          </table:table-cell>
          <table:table-cell office:value-type="string" calcext:value-type="string">
            <text:p>arXiv와 같은 프리프린트 서버에 게시된 경우입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unpublished</text:p>
          </table:table-cell>
          <table:table-cell office:value-type="string" calcext:value-type="string">
            <text:p>출판되지 않은 자료입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not_applicable</text:p>
          </table:table-cell>
          <table:table-cell office:value-type="string" calcext:value-type="string">
            <text:p>출판 단계에 대해 기술하기 어려운 자료를 의미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고아 저작물 등을 수집했을 때 그 자료의 상태를 알기 어려운 경우 등에 사용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기타 상태를 의미합니다. </text:p>
          </table:table-cell>
          <table:table-cell table:style-name="Default" table:number-columns-repeated="16382"/>
        </table:table-row>
        <table:table-row table:style-name="ro1" table:number-rows-repeated="2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Appendix 5-2. post_publication_status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설명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orrected</text:p>
          </table:table-cell>
          <table:table-cell office:value-type="string" calcext:value-type="string">
            <text:p>출판 후 오류 등이 수정된 상태입니다. erratum, corrigendum 등을 포함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expression_of_concern</text:p>
          </table:table-cell>
          <table:table-cell office:value-type="string" calcext:value-type="string">
            <text:p>출판 후 그 내용에 대해 이의가 제기된 상태입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withdrawn_by_author</text:p>
          </table:table-cell>
          <table:table-cell office:value-type="string" calcext:value-type="string">
            <text:p>출판 후 저자가 직접 철회한 상태입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retracted</text:p>
          </table:table-cell>
          <table:table-cell office:value-type="string" calcext:value-type="string">
            <text:p>출판 후 학술지나 출판사 등 저자 외의 주체에 의해 논문 등이 철회 또는 게시에서 내려간 상태입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상태의 정확한 확인이 어려운 경우 입력합니다. 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기타 상태를 의미합니다. </text:p>
          </table:table-cell>
          <table:table-cell table:style-name="Default" table:number-columns-repeated="16382"/>
        </table:table-row>
        <table:table-row table:style-name="ro1" table:number-rows-repeated="2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Appendix 5-3. repository_status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설명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submitted</text:p>
          </table:table-cell>
          <table:table-cell office:value-type="string" calcext:value-type="string">
            <text:p>리포지터리에 등록을 요청한 상태입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under_review</text:p>
          </table:table-cell>
          <table:table-cell office:value-type="string" calcext:value-type="string">
            <text:p>리포지터리 등록 여부를 결정하기 위한 리뷰 단계입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리포지터리 등록이 승인되었으나 아직 공개되지 않은 단계입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published</text:p>
          </table:table-cell>
          <table:table-cell office:value-type="string" calcext:value-type="string">
            <text:p>리포지터리 등록 후 공개된 단계입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rejected</text:p>
          </table:table-cell>
          <table:table-cell office:value-type="string" calcext:value-type="string">
            <text:p>리포지터리 리뷰 단계에서 탈락한 경우 입력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withdrawn_by_author</text:p>
          </table:table-cell>
          <table:table-cell office:value-type="string" calcext:value-type="string">
            <text:p>리포지터리 등록 요청 단계 이후, 리포지터리 제출자가 직접 등록 해제 요청 시 사용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archived_not_published</text:p>
          </table:table-cell>
          <table:table-cell office:value-type="string" calcext:value-type="string">
            <text:p>리포지터리에 등록이 승인되었으나 제출자가 공개를 거부했을 때 기재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보관기관 만료 등으로 인해 삭제된 경우 기재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객체의 상태를 알 수 없는 경우 기재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기타 상태사항입니다.</text:p>
          </table:table-cell>
          <table:table-cell table:style-name="Default" table:number-columns-repeated="16382"/>
        </table:table-row>
        <table:table-row table:style-name="ro1" table:number-rows-repeated="2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Appendix 6-1. link_type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설명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ites</text:p>
          </table:table-cell>
          <table:table-cell office:value-type="string" calcext:value-type="string">
            <text:p>본 레코드가 참조하는 객체가 인용한 다른 객체들을 서술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itedBy</text:p>
          </table:table-cell>
          <table:table-cell office:value-type="string" calcext:value-type="string">
            <text:p>본 레코드가 참조하는 객체를 인용하는 다른 객체들을 서술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hasRetraction</text:p>
          </table:table-cell>
          <table:table-cell office:value-type="string" calcext:value-type="string">
            <text:p>retraction이 발생했을 경우 그 공지문을 연결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isRetractionOf</text:p>
          </table:table-cell>
          <table:table-cell office:value-type="string" calcext:value-type="string">
            <text:p>객체 자체가 다른 객체에 대한 철회문일 경우 그 대상 객체를 연결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hasExpressionOfConcern</text:p>
          </table:table-cell>
          <table:table-cell office:value-type="string" calcext:value-type="string">
            <text:p>객체에 대한 우려 표명(expression of concern)이 발행되었을 때 그 대상 객체를 연결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isExpressionOfConernOf</text:p>
          </table:table-cell>
          <table:table-cell office:value-type="string" calcext:value-type="string">
            <text:p>객체 자체가 다른 객체에 대한 우려 표명인 경우 그 객체를 연결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hasErratum</text:p>
          </table:table-cell>
          <table:table-cell office:value-type="string" calcext:value-type="string">
            <text:p>객체에 대한 수정사항(erratum, correction 등)이 발행되었을 때 그 대상 객체를 연결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isErratumOf</text:p>
          </table:table-cell>
          <table:table-cell office:value-type="string" calcext:value-type="string">
            <text:p>객체 자체가 다른 객체에 대한 수정사항인 경우 그 객체를 연결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hasReply</text:p>
          </table:table-cell>
          <table:table-cell office:value-type="string" calcext:value-type="string">
            <text:p>객체에 대한 응답 letter (reply/comment) 가 발행된 경우 그 객체를 연결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isReplyOf</text:p>
          </table:table-cell>
          <table:table-cell office:value-type="string" calcext:value-type="string">
            <text:p>객체 자체가 다른 객체에 대한 응답 letter (reply/comment) 인 경우 그 대상 객체를 연결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isVersionOf</text:p>
          </table:table-cell>
          <table:table-cell office:value-type="string" calcext:value-type="string">
            <text:p>본 레코드가 참조하는 객체의 최초 버전이 있는 경우, 그 최초 버전의 객체를 연결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hasNewerVersion</text:p>
          </table:table-cell>
          <table:table-cell office:value-type="string" calcext:value-type="string">
            <text:p>본 레코드가 참조하는 객체의 새로운 버전이 있는 경우, 그 새로운 버전의 객체를 연결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isRelatedWith</text:p>
          </table:table-cell>
          <table:table-cell office:value-type="string" calcext:value-type="string">
            <text:p>위에 정의된 방식 외 본 레코드와 연관된 객체를 연결합니다</text:p>
          </table:table-cell>
          <table:table-cell table:style-name="Default" table:number-columns-repeated="16382"/>
        </table:table-row>
        <table:table-row table:style-name="ro1" table:number-rows-repeated="2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Appendix 6-2. identifier_type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설명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doi</text:p>
          </table:table-cell>
          <table:table-cell office:value-type="string" calcext:value-type="string">
            <text:p>DOI 식별자를 입력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pmid</text:p>
          </table:table-cell>
          <table:table-cell office:value-type="string" calcext:value-type="string">
            <text:p>PubMed의 PMID 식별자를 입력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repository_id</text:p>
          </table:table-cell>
          <table:table-cell office:value-type="string" calcext:value-type="string">
            <text:p>리포지터리에 저장된 식별자를 입력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기타 정의되지 않은 식별자의 경우입니다. 식별자가 없는 자료인 경우 리포지터리에 임시 레코드를 생성하거나, other&gt;unavailable로 입력 가능합니다.</text:p>
          </table:table-cell>
          <table:table-cell table:style-name="Default" table:number-columns-repeated="16382"/>
        </table:table-row>
        <table:table-row table:style-name="ro1" table:number-rows-repeated="2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Appendix 7-1. rights_status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설명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opyrighted</text:p>
          </table:table-cell>
          <table:table-cell office:value-type="string" calcext:value-type="string">
            <text:p>저작권 보호가 유효한 자료인 경우 이 값을 이용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public_domain</text:p>
          </table:table-cell>
          <table:table-cell office:value-type="string" calcext:value-type="string">
            <text:p>현재 저작권이 만료되어 퍼블릭 도메인 상태인 경우 이 값을 이용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저작권이 만료되었는지, 혹은 누군가에게 귀속되어 있는지 알 수 없는 경우 이 값을 이용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not_applicable</text:p>
          </table:table-cell>
          <table:table-cell office:value-type="string" calcext:value-type="string">
            <text:p>저작권 관련 정보를 지정할 수 없는 객체의 경우 이 값을 이용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기타 특수한 상태인 경우 이 값을 이용합니다.</text:p>
          </table:table-cell>
          <table:table-cell table:style-name="Default" table:number-columns-repeated="16382"/>
        </table:table-row>
        <table:table-row table:style-name="ro1" table:number-rows-repeated="2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Appendix 7-2. access_model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설명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pen_access</text:p>
          </table:table-cell>
          <table:table-cell office:value-type="string" calcext:value-type="string">
            <text:p>어떠한 형태로든 OpenAccess로 접근 가능하면 사용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free_to_read</text:p>
          </table:table-cell>
          <table:table-cell office:value-type="string" calcext:value-type="string">
            <text:p>OpenAccess가 아니지만 출판사 등 저작권자에 의해 임의로 개방된 자료의 경우 사용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restricted</text:p>
          </table:table-cell>
          <table:table-cell office:value-type="string" calcext:value-type="string">
            <text:p>접근이 제한된 경우 입력합니다. Paywall을 통해 제한된 경우 아래의 subscription을 사용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embargoed</text:p>
          </table:table-cell>
          <table:table-cell office:value-type="string" calcext:value-type="string">
            <text:p>공개 전까지 엠바고가 걸려 있는 자료의 경우 입력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subscription</text:p>
          </table:table-cell>
          <table:table-cell office:value-type="string" calcext:value-type="string">
            <text:p>Paywall 등으로 접근이 제한되어 비용을 지불할 경우 열람이 가능하다면 입력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institution_member_only</text:p>
          </table:table-cell>
          <table:table-cell office:value-type="string" calcext:value-type="string">
            <text:p>학회, 기관 회원인 경우에만 열람 가능한 경우 입력합니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접근권에 대한 정보가 없는 경우 입력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기타 접근 권한에 대해 입력합니다</text:p>
          </table:table-cell>
          <table:table-cell table:style-name="Default" table:number-columns-repeated="16382"/>
        </table:table-row>
        <table:table-row table:style-name="ro1" table:number-rows-repeated="2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Appendix 7-3. publishing_model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설명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traditional</text:p>
          </table:table-cell>
          <table:table-cell office:value-type="string" calcext:value-type="string">
            <text:p>전통적인 학술지 출판 방식 (출판사/학술지가 저작권 소유, Paywalled) 인 경우 입력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penaccess_gold</text:p>
          </table:table-cell>
          <table:table-cell office:value-type="string" calcext:value-type="string">
            <text:p>Gold Open Access 방식 (주로 APC) 인 경우 입력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penaccess_green</text:p>
          </table:table-cell>
          <table:table-cell office:value-type="string" calcext:value-type="string">
            <text:p>Green Open Access 방식 (저자가 직접 논문을 리포지터리에 기탁하여 공개되는 경우) 입력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penaccess_hybrid</text:p>
          </table:table-cell>
          <table:table-cell office:value-type="string" calcext:value-type="string">
            <text:p>OA가 아닌 학술지에서 OA 옵션을 제공하여 이를 통해 OA 형식으로 출판된 논문의 경우 입력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penaccess_diamond</text:p>
          </table:table-cell>
          <table:table-cell office:value-type="string" calcext:value-type="string">
            <text:p>APC가 없는 Diamond OA 방식으로 출판된 경우 입력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penaccess_other</text:p>
          </table:table-cell>
          <table:table-cell office:value-type="string" calcext:value-type="string">
            <text:p>기타 방식으로 OA 출판이 된 경우 입력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not_applicable</text:p>
          </table:table-cell>
          <table:table-cell office:value-type="string" calcext:value-type="string">
            <text:p>출판방식을 적용할 수 없는 객체들(Editorial, Invited Review, Comment 등)에 대해 이 값을 적용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출판방식을 알 수 없는 경우 적용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기타 출판방식입니다</text:p>
          </table:table-cell>
          <table:table-cell table:style-name="Default" table:number-columns-repeated="16382"/>
        </table:table-row>
        <table:table-row table:style-name="ro1" table:number-rows-repeated="2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Appendix 7-4. license_type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설명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reative_commons</text:p>
          </table:table-cell>
          <table:table-cell office:value-type="string" calcext:value-type="string">
            <text:p>Creative Commons 방식으로 출판/공개된 경우 적용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pen_source</text:p>
          </table:table-cell>
          <table:table-cell office:value-type="string" calcext:value-type="string">
            <text:p>오픈소스 방식으로 공개된 경우 적용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proprietary</text:p>
          </table:table-cell>
          <table:table-cell office:value-type="string" calcext:value-type="string">
            <text:p>저작권이 특정 저작권자에게 귀속되어 보호받고 소스가 공개되지 않은 경우 적용합니다. 저작권이 출판사에게 있는 경우에도 이를 적용합니다(특수한 경우 제외)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public_domain</text:p>
          </table:table-cell>
          <table:table-cell office:value-type="string" calcext:value-type="string">
            <text:p>저작권이 만료되어 공공에게 개방된 경우 적용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rights_statement</text:p>
          </table:table-cell>
          <table:table-cell office:value-type="string" calcext:value-type="string">
            <text:p>특정한 형태로 권리가 선언된 경우 적용합니다 (개인사용 가능, 재배포 또는 상업적 이용 시 저작권자 허락 등 CC외 저작권자가 임의로 지정한 경우)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라이선스 정보를 알 수 없는 경우 적용합니다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기타 정의되지 않은 라이선스 정보입니다.</text:p>
          </table:table-cell>
          <table:table-cell table:style-name="Default" table:number-columns-repeated="16382"/>
        </table:table-row>
        <table:table-row table:style-name="ro1" table:number-rows-repeated="2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Appendix 8. record_status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설명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reated</text:p>
          </table:table-cell>
          <table:table-cell office:value-type="string" calcext:value-type="string">
            <text:p>메타데이터가 생성된 경우 기재합니다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revised</text:p>
          </table:table-cell>
          <table:table-cell office:value-type="string" calcext:value-type="string">
            <text:p>메타데이터가 수정된 경우 기재합니다. 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deprecated</text:p>
          </table:table-cell>
          <table:table-cell office:value-type="string" calcext:value-type="string">
            <text:p>만료되어 삭제될 예정인 레코드의 경우 시스템이 자동으로 값을 deprecated로 전환합니다. 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superseded_by_other_record</text:p>
          </table:table-cell>
          <table:table-cell office:value-type="string" calcext:value-type="string">
            <text:p>다른 레코드로 이 레코드가 대체/갱신되었을 때 기재합니다. 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메타데이터가 삭제된 경우 기재합니다. 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메타데이터의 상태를 알 수 없는 경우 기재합니다. 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기타 특수한 상황에 대해 기재합니다. </text:p>
          </table:table-cell>
          <table:table-cell table:style-name="Default" table:number-columns-repeated="16382"/>
        </table:table-row>
        <table:table-row table:style-name="ro1" table:number-rows-repeated="1048354">
          <table:table-cell table:number-columns-repeated="2"/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Tahoma" svg:font-family="Tahoma" style:font-family-generic="system" style:font-pitch="variable"/>
    <style:font-face style:name="맑은 고딕" svg:font-family="'맑은 고딕'" style:font-family-generic="swiss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fo:font-family="'맑은 고딕'" style:font-family-generic="roman" style:font-pitch="variable" fo:font-size="12pt" fo:language="en" fo:country="US" style:letter-kerning="true" style:font-name-asian="맑은 고딕1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맑은 고딕'" style:font-family-generic="swiss" style:font-pitch="variable" fo:font-size="10pt" style:font-name-asian="맑은 고딕1" style:font-family-asian="'맑은 고딕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P0" style:volatile="true">
      <number:text>₩</number:text>
      <number:number number:decimal-places="0" number:min-decimal-places="0" number:min-integer-digits="1" number:grouping="true"/>
    </number:number-style>
    <number:number-style style:name="N148">
      <number:text>-₩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49P0" style:volatile="true">
      <number:text>₩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2" number:min-decimal-places="2" number:min-integer-digits="1" number:grouping="true"/>
    </number:number-style>
    <number:number-style style:name="N150">
      <number:text>-₩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₩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1P0"/>
    </number:number-style>
    <number:date-style style:name="N152">
      <number:day number:style="long"/>
      <number:text>-</number:text>
      <number:month number:textual="true"/>
      <number:text>-</number:text>
      <number:year/>
    </number:date-style>
    <number:date-style style:name="N153">
      <number:day number:style="long"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7">
      <number:hours/>
      <number:text>:</number:text>
      <number:minutes number:style="long"/>
    </number:time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59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160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6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6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date-style style:name="N164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65">
      <number:month number:style="long"/>
      <number:text>-</number:text>
      <number:day number:style="long"/>
    </number:date-style>
    <number:date-style style:name="N166">
      <number:month number:style="long"/>
      <number:text>-</number:text>
      <number:day number:style="long"/>
      <number:text>-</number:text>
      <number:year/>
    </number:date-style>
    <number:date-style style:name="N167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68">
      <number:hours/>
      <number:text>시</number:text>
      <number:minutes number:style="long"/>
      <number:text>분</number:text>
    </number:time-style>
    <number:time-style style:name="N169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70">
      <number:year number:style="long"/>
      <number:text>/</number:text>
      <number:month number:style="long"/>
      <number:text>/</number:text>
      <number:day number:style="long"/>
    </number:date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4P0" style:volatile="true">
      <number:number number:decimal-places="2" number:min-decimal-places="2" number:min-integer-digits="1" number:grouping="true"/>
    </number:number-style>
    <number:number-style style:name="N17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4P0"/>
    </number:number-style>
    <number:number-style style:name="N17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5P2" style:volatile="true">
      <number:text loext:blank-width-char="-"> </number:text>
      <number:fill-character> </number:fill-character>
      <number:text loext:blank-width-char="-1">- </number:text>
    </number:number-style>
    <number:text-style style:name="N175">
      <number:text loext:blank-width-char="-"> </number:text>
      <number:text-content/>
      <number:text loext:blank-width-char="-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 loext:blank-width-char="-"> ₩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6P1" style:volatile="true">
      <number:text>-₩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6P2" style:volatile="true">
      <number:text loext:blank-width-char="-"> ₩</number:text>
      <number:fill-character> </number:fill-character>
      <number:text loext:blank-width-char="-1">- </number:text>
    </number:number-style>
    <number:text-style style:name="N176">
      <number:text loext:blank-width-char="-"> </number:text>
      <number:text-content/>
      <number:text loext:blank-width-char="-"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77">
      <number:text loext:blank-width-char="-"> </number:text>
      <number:text-content/>
      <number:text loext:blank-width-char="-"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 loext:blank-width-char="-"> ₩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8P1" style:volatile="true">
      <number:text>-₩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8P2" style:volatile="true">
      <number:text loext:blank-width-char="-"> ₩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78">
      <number:text loext:blank-width-char="-"> </number:text>
      <number:text-content/>
      <number:text loext:blank-width-char="-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9">
      <number:minutes number:style="long"/>
      <number:text>:</number:text>
      <number:seconds number:style="long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1">
      <number:minutes number:style="long"/>
      <number:text>:</number:text>
      <number:seconds number:style="long" number:decimal-places="1"/>
    </number:time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2pt" style:font-name-asian="맑은 고딕" style:font-family-asian="'맑은 고딕'" style:font-family-generic-asian="swiss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  <loext:theme loext:name="Office 테마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9">0000/00/00</text:date>, <text:time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ppendix" style:display-name="PageStyle_Appendi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hema" style:display-name="PageStyle_Schem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eho Yi</meta:initial-creator>
    <meta:creation-date>2026-06-18T23:53:02</meta:creation-date>
    <dc:date>2026-06-19T12:37:13.815173700</dc:date>
    <meta:generator>LibreOffice/26.2.4.2$Windows_X86_64 LibreOffice_project/0229ac93fcf0d7cbc6376066c6f35021cef002dc</meta:generator>
    <meta:editing-duration>PT2H56M9S</meta:editing-duration>
    <meta:editing-cycles>66</meta:editing-cycles>
    <meta:document-statistic meta:table-count="2" meta:cell-count="1463" meta:object-count="0"/>
    <meta:user-defined meta:name="AppVersion">16.0300</meta:user-defined>
  </office:meta>
</office:document-meta>
</file>